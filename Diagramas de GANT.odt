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7A0000018B299EBEEA.png" manifest:media-type="image/png"/>
  <manifest:file-entry manifest:full-path="Pictures/1000000100000462000001958F2F135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ac33b"/>
    </style:style>
    <style:style style:name="T1" style:family="text">
      <style:text-properties officeooo:rsid="000ac33b"/>
    </style:style>
    <style:style style:name="T2" style:family="text">
      <style:text-properties officeooo:rsid="000c3f1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line-break/>Primer Diagrama de GANT:<text:line-break/></text:span><draw:frame draw:style-name="fr1" draw:name="Imagen2" text:anchor-type="char" svg:x="-0.106cm" svg:y="1.111cm" svg:width="17cm" svg:height="6.135cm" draw:z-index="0"><draw:image xlink:href="Pictures/1000000100000462000001958F2F1353.png" xlink:type="simple" xlink:show="embed" xlink:actuate="onLoad" draw:mime-type="image/png"/></draw:frame><text:span text:style-name="T1"><text:line-break/>Inicio 20 Marzo<text:line-break/>Fin 15 de Mayo<text:line-break/><text:line-break/><text:line-break/>Último Diagrama de GANT :</text:span><text:line-break/><draw:frame draw:style-name="fr2" draw:name="Imagen1" text:anchor-type="char" svg:x="0.078cm" svg:y="10.121cm" svg:width="17cm" svg:height="5.858cm" draw:z-index="1"><draw:image xlink:href="Pictures/100000010000047A0000018B299EBEEA.png" xlink:type="simple" xlink:show="embed" xlink:actuate="onLoad" draw:mime-type="image/png"/></draw:frame><text:span text:style-name="T1">Inicio 20 Marzo<text:line-break/>Fin </text:span><text:span text:style-name="T2">21</text:span><text:span text:style-name="T1"> de Mayo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05T12:01:41.629399100</meta:creation-date>
    <dc:date>2026-06-05T12:11:21.116870400</dc:date>
    <meta:editing-duration>PT5M31S</meta:editing-duration>
    <meta:editing-cycles>2</meta:editing-cycles>
    <meta:generator>LibreOffice/25.2.7.2$Windows_X86_64 LibreOffice_project/5cbfd1ab6520636bb5f7b99185aa69bd7456825d</meta:generator>
    <meta:document-statistic meta:table-count="0" meta:image-count="2" meta:object-count="0" meta:page-count="1" meta:paragraph-count="1" meta:word-count="23" meta:character-count="116" meta:non-whitespace-character-count="90"/>
  </office:meta>
</office:document-meta>
</file>